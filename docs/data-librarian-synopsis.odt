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ere is a complete synopsis of the Data Librarian project that you can copy and paste into a new chat to instantly provide the AI with the necessary context.</text:p>
      <text:p text:style-name="Text_20_body"><text:span text:style-name="Strong_20_Emphasis">Project Overview:</text:span> "Data Librarian" is a hybrid application designed to manage a massive collection of approximately 10,000 ebooks. It features a <text:span text:style-name="Strong_20_Emphasis">Next.js (React) frontend</text:span> acting as the UI (the "Head Librarian" architecture) and a <text:span text:style-name="Strong_20_Emphasis">Python backend</text:span> ("The Archives") handling the heavy lifting of file operations. The system scans folders, identifies duplicates using SHA256 hashing to preserve different editions, extracts metadata, and automatically sorts files into specific Author/Title directories.</text:p>
      <text:h text:style-name="Heading_20_3" text:outline-level="3">✅ Work Completed</text:h>
      <text:list text:style-name="L1">
        <text:list-item>
          <text:p text:style-name="P2"><text:span text:style-name="Strong_20_Emphasis">Next.js Environment Upgrade:</text:span> Successfully upgraded the frontend to <text:span text:style-name="Strong_20_Emphasis">Next.js 16.2.1 (Turbopack)</text:span> and React 19.2.x. This drastically improved cold boot times (down to ~296ms) and resolved module compilation bottlenecks. </text:p>
        </text:list-item>
        <text:list-item>
          <text:p text:style-name="P2"><text:span text:style-name="Strong_20_Emphasis">Workspace &amp; Security Cleanup:</text:span> Identified and removed a "Shadow Project" conflict (a stray <text:span text:style-name="Source_20_Text">temp_web</text:span> lockfile in the home directory) that was confusing Next.js workspace routing. Ran <text:span text:style-name="Source_20_Text">npm audit fix</text:span> to clear out ReDoS and Prototype Pollution vulnerabilities in dependencies. </text:p>
        </text:list-item>
        <text:list-item>
          <text:p text:style-name="P2"><text:span text:style-name="Strong_20_Emphasis">UI Dashboard Layout Fixed:</text:span> Corrected the placement of the <text:span text:style-name="Source_20_Text">&lt;OrganizeLibraryButton /&gt;</text:span> so it sits perfectly above the 4-column statistics grid, preserving the application's Semantic Color System and dark-mode UI layout. </text:p>
        </text:list-item>
        <text:list-item>
          <text:p text:style-name="P2"><text:span text:style-name="Strong_20_Emphasis">Proxmox Configuration Backup:</text:span> Successfully ran a <text:span text:style-name="Source_20_Text">backup_pve.sh</text:span> script that connects to your Proxmox server (PVE), compresses configuration files, and securely pulls the archive over SCP to a local <text:span text:style-name="Source_20_Text">./backups/</text:span> directory. </text:p>
        </text:list-item>
        <text:list-item>
          <text:p text:style-name="P1"><text:span text:style-name="Strong_20_Emphasis">Python Sorting Module (</text:span><text:span text:style-name="Strong_20_Emphasis"><text:span text:style-name="Source_20_Text">librarian_dream.py</text:span></text:span><text:span text:style-name="Strong_20_Emphasis">):</text:span> Created the core Python module designed to safely extract metadata (Title, Author) from PDFs/EPUBs and organize the library into new destination folders. </text:p>
        </text:list-item>
      </text:list>
      <text:h text:style-name="Heading_20_3" text:outline-level="3">🚧 In Progress / Immediate Next Steps</text:h>
      <text:list text:style-name="L2">
        <text:list-item>
          <text:p text:style-name="P4"><text:span text:style-name="Strong_20_Emphasis">Fixing the Python Web Interface (</text:span><text:span text:style-name="Strong_20_Emphasis"><text:span text:style-name="Source_20_Text">web_interface.py</text:span></text:span><text:span text:style-name="Strong_20_Emphasis">):</text:span> We are currently fixing an indentation and formatting bug in the Python backend caused by copy-pasting code that accidentally included markdown asterisks. We need to successfully add the <text:span text:style-name="Source_20_Text">do_POST</text:span> and <text:span text:style-name="Source_20_Text">do_OPTIONS</text:span> HTTP handlers so the Next.js frontend can communicate with Python without throwing a "Failed to fetch" CORS error. </text:p>
        </text:list-item>
        <text:list-item>
          <text:p text:style-name="P4"><text:span text:style-name="Strong_20_Emphasis">Testing the API Connection:</text:span> Once <text:span text:style-name="Source_20_Text">web_interface.py</text:span> boots cleanly on Port 2226, the immediate next step is to click the "Organize Library" button on the Next.js dashboard and verify it triggers the <text:span text:style-name="Source_20_Text">organize_library</text:span> Python thread. </text:p>
        </text:list-item>
        <text:list-item>
          <text:p text:style-name="P3"><text:span text:style-name="Strong_20_Emphasis">Proxmox Script Polish:</text:span> The <text:span text:style-name="Source_20_Text">backup_pve.sh</text:span> script has a minor typo where it tries to <text:span text:style-name="Source_20_Text">tar</text:span> a redundant <text:span text:style-name="Source_20_Text">/etc/storage.cfg</text:span> path instead of just relying on the <text:span text:style-name="Source_20_Text">/etc/pve/</text:span> directory. This single word needs to be removed from the script to stop a non-critical "Cannot stat" warning. </text:p>
        </text:list-item>
      </text:list>
      <text:h text:style-name="Heading_20_3" text:outline-level="3"><text:soft-page-break/>📋 Yet to be Started</text:h>
      <text:list text:style-name="L3">
        <text:list-item>
          <text:p text:style-name="P6"><text:span text:style-name="Strong_20_Emphasis">Advanced Metadata &amp; Tag Editing:</text:span> Integrating <text:span text:style-name="Source_20_Text">exiftool</text:span> (specifically the locally cloned <text:span text:style-name="Source_20_Text">exiftool-web</text:span> repository) to add robust metadata viewing and tag editing capabilities for your ebooks. We need to determine if this will be integrated directly into Data Librarian or run as a separate tool. </text:p>
        </text:list-item>
        <text:list-item>
          <text:p text:style-name="P6"><text:span text:style-name="Strong_20_Emphasis">Dynamic Library Catalog:</text:span> Wiring up the <text:span text:style-name="Source_20_Text">/api/library</text:span> endpoint so the Next.js frontend can fetch the actual list of files and directories and display them in the "Library" tab. </text:p>
        </text:list-item>
        <text:list-item>
          <text:p text:style-name="P5"><text:span text:style-name="Strong_20_Emphasis">Performance Optimization:</text:span> Implementing the TODO item in <text:span text:style-name="Source_20_Text">page.tsx</text:span> for "Total Size Calculation Performance Optimization" to ensure the dashboard loads stats quickly even with 10,000+ files.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6T08:27:38.444449803</meta:creation-date>
    <dc:date>2026-05-06T08:28:40.189037673</dc:date>
    <meta:editing-duration>PT1M3S</meta:editing-duration>
    <meta:editing-cycles>1</meta:editing-cycles>
    <meta:document-statistic meta:table-count="0" meta:image-count="0" meta:object-count="0" meta:page-count="2" meta:paragraph-count="16" meta:word-count="506" meta:character-count="3390" meta:non-whitespace-character-count="2900"/>
    <meta:generator>LibreOffice/7.4.7.2$Linux_X86_64 LibreOffice_project/40$Build-2</meta:generator>
  </office:meta>
</office:document-meta>
</file>